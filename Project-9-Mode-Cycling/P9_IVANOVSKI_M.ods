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REFRESHDATA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P1" style:family="paragraph">
      <style:paragraph-properties fo:text-align="center"/>
    </style:style>
  </office:automatic-styles>
  <office:body>
    <office:spreadsheet>
      <table:calculation-settings table:search-criteria-must-apply-to-whole-cell="false" table:automatic-find-labels="false" table:null-year="1950"/>
      <table:table table:name="Sheet1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 xlink:href="" xlink:type="simple">
            <form:button form:name="REFRESH DATA" form:control-implementation="ooo:com.sun.star.form.component.CommandButton" xml:id="control1" form:id="control1" form:label="REFRESH DATA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EFRESHDATA.LoadPLCData?language=Basic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VALUE</text:p>
          </table:table-cell>
        </table:table-row>
        <table:table-row table:style-name="ro1">
          <table:table-cell office:value-type="string">
            <text:p>CURRENT MODE:</text:p>
          </table:table-cell>
          <table:table-cell/>
        </table:table-row>
        <table:table-row table:style-name="ro1">
          <table:table-cell office:value-type="string">
            <text:p>CURRENT FUNCTION:</text:p>
          </table:table-cell>
          <table:table-cell/>
        </table:table-row>
        <table:table-row table:style-name="ro1">
          <table:table-cell office:value-type="string">
            <text:p>CURRENT MODE + FUNCTION:</text:p>
          </table:table-cell>
          <table:table-cell/>
        </table:table-row>
        <table:table-row table:style-name="ro1">
          <table:table-cell office:value-type="string">
            <text:p>M1F1 TOTAL CYCLES:</text:p>
          </table:table-cell>
          <table:table-cell/>
        </table:table-row>
        <table:table-row table:style-name="ro1">
          <table:table-cell office:value-type="string">
            <text:p>M1F2 TOTAL CYCLES:</text:p>
          </table:table-cell>
          <table:table-cell/>
        </table:table-row>
        <table:table-row table:style-name="ro1">
          <table:table-cell office:value-type="string">
            <text:p>M2F1 TOTAL CYCLES:</text:p>
          </table:table-cell>
          <table:table-cell/>
        </table:table-row>
        <table:table-row table:style-name="ro1">
          <table:table-cell office:value-type="string">
            <text:p>M2F2 TOTAL CYCLES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>
            <draw:control table:end-cell-address="Sheet1.B13" table:end-x="0.5823in" table:end-y="0.1315in" draw:z-index="0" draw:name="REFRESH DATA" draw:text-style-name="P1" svg:width="2.2909in" svg:height="0.6551in" svg:x="0.5346in" svg:y="0.0098in" draw:control="control1">
              <svg:title>REFRESH DATA</svg:title>
            </draw:control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102in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209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209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16">06/16/2026</text:date>, <text:time>17:1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6-03T12:56:00.288802000</meta:creation-date>
    <meta:generator>OpenOffice/4.1.16$Win32 OpenOffice.org_project/4116m3$Build-9816</meta:generator>
    <dc:date>2026-06-16T17:10:03.80</dc:date>
    <meta:editing-duration>PT4H57M54S</meta:editing-duration>
    <meta:editing-cycles>59</meta:editing-cycles>
    <meta:document-statistic meta:table-count="1" meta:cell-count="9" meta:object-count="1"/>
  </office:meta>
</office:document-meta>
</file>

<file path=Basic/Standard/REFRESHDATA.xml><?xml version="1.0" encoding="utf-8"?>
<!DOCTYPE module  PUBLIC '-//OpenOffice.org//DTD OfficeDocument 1.0//EN'  'module.dtd'>
<script:module xmlns:script="http://openoffice.org/2000/script" script:name="REFRESHDATA" script:language="StarBasic">Sub LoadPLCData
    Dim oDoc As Object
    Dim oSheet As Object
    
    oDoc = ThisComponent
    oSheet = oDoc.Sheets(0) ' Pulls data into the first sheet
       
    oSheet.getCellRangeByName("B2").Formula = "=DDE(""RSLinx"";""DATA"";""ST9:0"")"
    oSheet.getCellRangeByName("B3").Formula = "=DDE(""RSLinx"";""DATA"";""ST9:1"")"
    oSheet.getCellRangeByName("B4").Formula = "=DDE(""RSLinx"";""DATA"";""ST9:2"")"
    
    oSheet.getCellRangeByName("B5").Formula = "=DDE(""RSLinx"";""DATA"";""N7:0"")"
    oSheet.getCellRangeByName("B6").Formula = "=DDE(""RSLinx"";""DATA"";""N7:1"")"
    oSheet.getCellRangeByName("B7").Formula = "=DDE(""RSLinx"";""DATA"";""N7:2"")"
    oSheet.getCellRangeByName("B8").Formula = "=DDE(""RSLinx"";""DATA"";""N7:3"")"
    
    oDoc.calculateAll(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EFRESHDATA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